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x (mm)</text:p>
          </table:table-cell>
          <table:table-cell office:value-type="string" calcext:value-type="string">
            <text:p>U (mv)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,2 Etdude qualitiattiv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9" calcext:value-type="float">
            <text:p>23,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3.9" calcext:value-type="float">
            <text:p>23,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5" calcext:value-type="float">
            <text:p>18,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2" calcext:value-type="float">
            <text:p>26,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4" calcext:value-type="float">
            <text:p>25,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.6" calcext:value-type="float">
            <text:p>41,6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41.6" calcext:value-type="float">
            <text:p>41,6</text:p>
          </table:table-cell>
        </table:table-row>
        <table:table-row table:style-name="ro1">
          <table:table-cell office:value-type="float" office:value="10.65" calcext:value-type="float">
            <text:p>10,6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0.65" calcext:value-type="float">
            <text:p>10,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3" calcext:value-type="float">
            <text:p>25,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5.3" calcext:value-type="float">
            <text:p>25,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9" calcext:value-type="float">
            <text:p>539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561" calcext:value-type="float">
            <text:p>561</text:p>
          </table:table-cell>
          <table:table-cell table:number-columns-repeated="5"/>
          <table:table-cell office:value-type="float" office:value="14.5" calcext:value-type="float">
            <text:p>14,5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8.2" calcext:value-type="float">
            <text:p>18,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.7" calcext:value-type="float">
            <text:p>19,7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9.7" calcext:value-type="float">
            <text:p>19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4T16:19:59.988192530</meta:creation-date>
    <dc:date>2025-12-04T17:03:05.781130127</dc:date>
    <meta:editing-duration>PT21M8S</meta:editing-duration>
    <meta:editing-cycles>1</meta:editing-cycles>
    <meta:document-statistic meta:table-count="1" meta:cell-count="73" meta:object-count="0"/>
    <meta:generator>LibreOffice/24.2.7.2$Linux_X86_64 LibreOffice_project/420$Build-2</meta:generator>
  </office:meta>
</office:document-meta>
</file>