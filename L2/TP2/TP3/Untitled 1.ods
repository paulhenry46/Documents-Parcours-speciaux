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aie</text:p>
          </table:table-cell>
          <table:table-cell office:value-type="string" calcext:value-type="string">
            <text:p>Longueur d’onde</text:p>
          </table:table-cell>
          <table:table-cell office:value-type="string" calcext:value-type="string">
            <text:p>Angle Brut</text:p>
          </table:table-cell>
          <table:table-cell office:value-type="string" calcext:value-type="string">
            <text:p>Angle par rapport à la normale</text:p>
          </table:table-cell>
          <table:table-cell office:value-type="string" calcext:value-type="string">
            <text:p>Longueur d’onde</text:p>
          </table:table-cell>
          <table:table-cell table:number-columns-repeated="2"/>
          <table:table-cell office:value-type="string" calcext:value-type="string">
            <text:p>theta</text:p>
          </table:table-cell>
          <table:table-cell office:value-type="string" calcext:value-type="string">
            <text:p>lamb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une</text:p>
          </table:table-cell>
          <table:table-cell office:value-type="float" office:value="579" calcext:value-type="float">
            <text:p>579</text:p>
          </table:table-cell>
          <table:table-cell office:value-type="float" office:value="200.07" calcext:value-type="float">
            <text:p>200,07</text:p>
          </table:table-cell>
          <table:table-cell table:formula="of:=[.C2]-180.08" office:value-type="float" office:value="19.99" calcext:value-type="float">
            <text:p>19,99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9.99" calcext:value-type="float">
            <text:p>19,99</text:p>
          </table:table-cell>
          <table:table-cell office:value-type="float" office:value="579" calcext:value-type="float">
            <text:p>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une 2</text:p>
          </table:table-cell>
          <table:table-cell office:value-type="float" office:value="577" calcext:value-type="float">
            <text:p>577</text:p>
          </table:table-cell>
          <table:table-cell office:value-type="float" office:value="200.02" calcext:value-type="float">
            <text:p>200,02</text:p>
          </table:table-cell>
          <table:table-cell table:formula="of:=[.C3]-180.08" office:value-type="float" office:value="19.94" calcext:value-type="float">
            <text:p>19,94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9.94" calcext:value-type="float">
            <text:p>19,94</text:p>
          </table:table-cell>
          <table:table-cell office:value-type="float" office:value="577" calcext:value-type="float">
            <text:p>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t</text:p>
          </table:table-cell>
          <table:table-cell office:value-type="float" office:value="546.1" calcext:value-type="float">
            <text:p>546,1</text:p>
          </table:table-cell>
          <table:table-cell office:value-type="float" office:value="198.56" calcext:value-type="float">
            <text:p>198,56</text:p>
          </table:table-cell>
          <table:table-cell table:formula="of:=[.C4]-180.08" office:value-type="float" office:value="18.48" calcext:value-type="float">
            <text:p>18,48</text:p>
          </table:table-cell>
          <table:table-cell office:value-type="float" office:value="546.1" calcext:value-type="float">
            <text:p>546,1</text:p>
          </table:table-cell>
          <table:table-cell table:number-columns-repeated="2"/>
          <table:table-cell office:value-type="float" office:value="18.48" calcext:value-type="float">
            <text:p>18,48</text:p>
          </table:table-cell>
          <table:table-cell office:value-type="float" office:value="546.1" calcext:value-type="float">
            <text:p>546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eu-vert</text:p>
          </table:table-cell>
          <table:table-cell office:value-type="float" office:value="491.6" calcext:value-type="float">
            <text:p>491,6</text:p>
          </table:table-cell>
          <table:table-cell office:value-type="float" office:value="197" calcext:value-type="float">
            <text:p>197</text:p>
          </table:table-cell>
          <table:table-cell table:formula="of:=[.C5]-180.08" office:value-type="float" office:value="16.92" calcext:value-type="float">
            <text:p>16,92</text:p>
          </table:table-cell>
          <table:table-cell office:value-type="float" office:value="491.6" calcext:value-type="float">
            <text:p>491,6</text:p>
          </table:table-cell>
          <table:table-cell table:number-columns-repeated="2"/>
          <table:table-cell office:value-type="float" office:value="16.92" calcext:value-type="float">
            <text:p>16,92</text:p>
          </table:table-cell>
          <table:table-cell office:value-type="float" office:value="491.6" calcext:value-type="float">
            <text:p>49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go</text:p>
          </table:table-cell>
          <table:table-cell office:value-type="float" office:value="435.8" calcext:value-type="float">
            <text:p>435,8</text:p>
          </table:table-cell>
          <table:table-cell office:value-type="float" office:value="195" calcext:value-type="float">
            <text:p>195</text:p>
          </table:table-cell>
          <table:table-cell table:formula="of:=[.C6]-180.08" office:value-type="float" office:value="14.92" calcext:value-type="float">
            <text:p>14,92</text:p>
          </table:table-cell>
          <table:table-cell office:value-type="float" office:value="435.8" calcext:value-type="float">
            <text:p>435,8</text:p>
          </table:table-cell>
          <table:table-cell table:number-columns-repeated="2"/>
          <table:table-cell office:value-type="float" office:value="14.92" calcext:value-type="float">
            <text:p>14,92</text:p>
          </table:table-cell>
          <table:table-cell office:value-type="float" office:value="435.8" calcext:value-type="float">
            <text:p>435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404.7" calcext:value-type="float">
            <text:p>404,7</text:p>
          </table:table-cell>
          <table:table-cell office:value-type="float" office:value="193.57" calcext:value-type="float">
            <text:p>193,57</text:p>
          </table:table-cell>
          <table:table-cell table:formula="of:=[.C7]-180.08" office:value-type="float" office:value="13.49" calcext:value-type="float">
            <text:p>13,49</text:p>
          </table:table-cell>
          <table:table-cell office:value-type="float" office:value="404.7" calcext:value-type="float">
            <text:p>404,7</text:p>
          </table:table-cell>
          <table:table-cell table:number-columns-repeated="2"/>
          <table:table-cell office:value-type="float" office:value="13.49" calcext:value-type="float">
            <text:p>13,49</text:p>
          </table:table-cell>
          <table:table-cell office:value-type="float" office:value="404.7" calcext:value-type="float">
            <text:p>404,7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aie</text:p>
          </table:table-cell>
          <table:table-cell office:value-type="string" calcext:value-type="string">
            <text:p>Longueur d’onde</text:p>
          </table:table-cell>
          <table:table-cell office:value-type="string" calcext:value-type="string">
            <text:p>N calculé</text:p>
          </table:table-cell>
          <table:table-cell office:value-type="string" calcext:value-type="string">
            <text:p>Incertitu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une</text:p>
          </table:table-cell>
          <table:table-cell office:value-type="float" office:value="579" calcext:value-type="float">
            <text:p>579</text:p>
          </table:table-cell>
          <table:table-cell table:formula="of:=SIN([.D2]*(3.14/180))/([.B11]*10^(-9))" office:value-type="float" office:value="590138.011455648" calcext:value-type="float">
            <text:p>590138,011455648</text:p>
          </table:table-cell>
          <table:table-cell table:formula="of:=[.C11]*0.05/[.D2]" office:value-type="float" office:value="1476.08307017421" calcext:value-type="float">
            <text:p>1476,083070174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une 2</text:p>
          </table:table-cell>
          <table:table-cell office:value-type="float" office:value="577" calcext:value-type="float">
            <text:p>577</text:p>
          </table:table-cell>
          <table:table-cell table:formula="of:=SIN([.D3]*(3.14/180))/([.B12]*10^(-9))" office:value-type="float" office:value="590762.657187012" calcext:value-type="float">
            <text:p>590762,657187012</text:p>
          </table:table-cell>
          <table:table-cell table:formula="of:=[.C12]*0.05/[.D3]" office:value-type="float" office:value="1481.35069505269" calcext:value-type="float">
            <text:p>1481,350695052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rt</text:p>
          </table:table-cell>
          <table:table-cell office:value-type="float" office:value="546.1" calcext:value-type="float">
            <text:p>546,1</text:p>
          </table:table-cell>
          <table:table-cell table:formula="of:=SIN([.D4]*(3.14/180))/([.B13]*10^(-9))" office:value-type="float" office:value="580147.45399968" calcext:value-type="float">
            <text:p>580147,45399968</text:p>
          </table:table-cell>
          <table:table-cell table:formula="of:=[.C13]*0.05/[.D4]" office:value-type="float" office:value="1569.66302489091" calcext:value-type="float">
            <text:p>1569,66302489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eu-vert</text:p>
          </table:table-cell>
          <table:table-cell office:value-type="float" office:value="491.6" calcext:value-type="float">
            <text:p>491,6</text:p>
          </table:table-cell>
          <table:table-cell table:formula="of:=SIN([.D5]*(3.14/180))/([.B14]*10^(-9))" office:value-type="float" office:value="591726.881090909" calcext:value-type="float">
            <text:p>591726,881090909</text:p>
          </table:table-cell>
          <table:table-cell table:formula="of:=[.C14]*0.05/[.D5]" office:value-type="float" office:value="1748.60189447668" calcext:value-type="float">
            <text:p>1748,60189447668</text:p>
          </table:table-cell>
          <table:table-cell table:number-columns-repeated="3"/>
          <table:table-cell office:value-type="string" calcext:value-type="string">
            <text:p>theta_i</text:p>
          </table:table-cell>
          <table:table-cell office:value-type="string" calcext:value-type="string">
            <text:p>theta_if</text:p>
          </table:table-cell>
          <table:table-cell office:value-type="string" calcext:value-type="string">
            <text:p>theta_d</text:p>
          </table:table-cell>
          <table:table-cell office:value-type="string" calcext:value-type="string">
            <text:p>theta_df</text:p>
          </table:table-cell>
          <table:table-cell office:value-type="string" calcext:value-type="string">
            <text:p>theta_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go</text:p>
          </table:table-cell>
          <table:table-cell office:value-type="float" office:value="435.8" calcext:value-type="float">
            <text:p>435,8</text:p>
          </table:table-cell>
          <table:table-cell table:formula="of:=SIN([.D6]*(3.14/180))/([.B15]*10^(-9))" office:value-type="float" office:value="590506.061270801" calcext:value-type="float">
            <text:p>590506,061270801</text:p>
          </table:table-cell>
          <table:table-cell table:formula="of:=[.C15]*0.05/[.D6]" office:value-type="float" office:value="1978.90771203352" calcext:value-type="float">
            <text:p>1978,9077120335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98.4" calcext:value-type="float">
            <text:p>198,4</text:p>
          </table:table-cell>
          <table:table-cell table:formula="of:=[.J15]-[.I15]" office:value-type="float" office:value="8.40000000000001" calcext:value-type="float">
            <text:p>8,40000000000001</text:p>
          </table:table-cell>
          <table:table-cell table:formula="of:=-[.K15]" office:value-type="float" office:value="-8.40000000000001" calcext:value-type="float">
            <text:p>-8,40000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404.7" calcext:value-type="float">
            <text:p>404,7</text:p>
          </table:table-cell>
          <table:table-cell table:formula="of:=SIN([.D7]*(3.14/180))/([.B16]*10^(-9))" office:value-type="float" office:value="576129.430724994" calcext:value-type="float">
            <text:p>576129,430724994</text:p>
          </table:table-cell>
          <table:table-cell table:formula="of:=[.C16]*0.05/[.D7]" office:value-type="float" office:value="2135.39448007782" calcext:value-type="float">
            <text:p>2135,3944800778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formula="of:=[.J16]-[.I16]" office:value-type="float" office:value="-1" calcext:value-type="float">
            <text:p>-1</text:p>
          </table:table-cell>
          <table:table-cell table:formula="of:=-[.K1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199.53" calcext:value-type="float">
            <text:p>199,53</text:p>
          </table:table-cell>
          <table:table-cell table:formula="of:=[.J17]-[.I17]" office:value-type="float" office:value="-10.47" calcext:value-type="float">
            <text:p>-10,47</text:p>
          </table:table-cell>
          <table:table-cell table:formula="of:=-[.K17]" office:value-type="float" office:value="10.47" calcext:value-type="float">
            <text:p>10,4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201.24" calcext:value-type="float">
            <text:p>201,24</text:p>
          </table:table-cell>
          <table:table-cell table:formula="of:=[.J18]-[.I18]" office:value-type="float" office:value="-18.76" calcext:value-type="float">
            <text:p>-18,76</text:p>
          </table:table-cell>
          <table:table-cell table:formula="of:=-[.K18]" office:value-type="float" office:value="18.76" calcext:value-type="float">
            <text:p>18,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203.44" calcext:value-type="float">
            <text:p>203,44</text:p>
          </table:table-cell>
          <table:table-cell table:formula="of:=[.J19]-[.I19]" office:value-type="float" office:value="-26.56" calcext:value-type="float">
            <text:p>-26,56</text:p>
          </table:table-cell>
          <table:table-cell table:formula="of:=-[.K19]" office:value-type="float" office:value="26.56" calcext:value-type="float">
            <text:p>26,56</text:p>
          </table:table-cell>
          <table:table-cell table:number-columns-repeated="5"/>
        </table:table-row>
        <table:table-row-group>
          <table:table-row table:style-name="ro1">
            <table:table-cell table:number-columns-repeated="7"/>
            <table:table-cell office:value-type="float" office:value="60" calcext:value-type="float">
              <text:p>60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07.08" calcext:value-type="float">
              <text:p>207,08</text:p>
            </table:table-cell>
            <table:table-cell table:formula="of:=[.J20]-[.I20]" office:value-type="float" office:value="-32.92" calcext:value-type="float">
              <text:p>-32,92</text:p>
            </table:table-cell>
            <table:table-cell table:formula="of:=-[.K20]" office:value-type="float" office:value="32.92" calcext:value-type="float">
              <text:p>32,92</text:p>
            </table:table-cell>
            <table:table-cell table:number-columns-repeated="5"/>
          </table:table-row>
          <table:table-row table:style-name="ro1">
            <table:table-cell table:number-columns-repeated="17"/>
          </table:table-row>
          <table:table-row table:style-name="ro1">
            <table:table-cell table:number-columns-repeated="12"/>
            <table:table-cell office:value-type="string" calcext:value-type="string">
              <text:p>theta_i</text:p>
            </table:table-cell>
            <table:table-cell office:value-type="string" calcext:value-type="string">
              <text:p>theta_d</text:p>
            </table:table-cell>
            <table:table-cell office:value-type="string" calcext:value-type="string">
              <text:p>diff</text:p>
            </table:table-cell>
            <table:table-cell office:value-type="string" calcext:value-type="string">
              <text:p>N calculé</text:p>
            </table:table-cell>
            <table:table-cell office:value-type="string" calcext:value-type="string">
              <text:p>Incertitude</text:p>
            </table:table-cell>
          </table:table-row>
          <table:table-row table:style-name="ro1">
            <table:table-cell table:number-columns-repeated="12"/>
            <table:table-cell office:value-type="float" office:value="10" calcext:value-type="float">
              <text:p>10</text:p>
            </table:table-cell>
            <table:table-cell office:value-type="float" office:value="-8.40000000000001" calcext:value-type="float">
              <text:p>-8,40000000000001</text:p>
            </table:table-cell>
            <table:table-cell table:formula="of:=-(SIN(3.14/180*[.N23])-SIN(3.14/180*[.M23]))" office:value-type="float" office:value="0.319570542099958" calcext:value-type="float">
              <text:p>0,319570542099958</text:p>
            </table:table-cell>
            <table:table-cell table:formula="of:=[.O23]/([.$B$13]*10^(-9))" office:value-type="float" office:value="585186.85607024" calcext:value-type="float">
              <text:p>585186,85607024</text:p>
            </table:table-cell>
            <table:table-cell table:formula="of:=[.P23]*0.05/[.O22]" office:value-type="string" office:string-value="" calcext:value-type="error">
              <text:p>#VALUE!</text:p>
            </table:table-cell>
          </table:table-row>
          <table:table-row table:style-name="ro1">
            <table:table-cell table:number-columns-repeated="12"/>
            <table:table-cell office:value-type="float" office:value="20" calcext:value-type="float">
              <text:p>20</text:p>
            </table:table-cell>
            <table:table-cell office:value-type="float" office:value="1" calcext:value-type="float">
              <text:p>1</text:p>
            </table:table-cell>
            <table:table-cell table:formula="of:=-(SIN(3.14/180*[.N24])-SIN(3.14/180*[.M24]))" office:value-type="float" office:value="0.324410288837497" calcext:value-type="float">
              <text:p>0,324410288837497</text:p>
            </table:table-cell>
            <table:table-cell table:formula="of:=[.O24]/([.$B$13]*10^(-9))" office:value-type="float" office:value="594049.237937186" calcext:value-type="float">
              <text:p>594049,237937186</text:p>
            </table:table-cell>
            <table:table-cell/>
          </table:table-row>
          <table:table-row table:style-name="ro1">
            <table:table-cell table:number-columns-repeated="12"/>
            <table:table-cell office:value-type="float" office:value="30" calcext:value-type="float">
              <text:p>30</text:p>
            </table:table-cell>
            <table:table-cell office:value-type="float" office:value="10.47" calcext:value-type="float">
              <text:p>10,47</text:p>
            </table:table-cell>
            <table:table-cell table:formula="of:=-(SIN(3.14/180*[.N25])-SIN(3.14/180*[.M25]))" office:value-type="float" office:value="0.31814053087621" calcext:value-type="float">
              <text:p>0,31814053087621</text:p>
            </table:table-cell>
            <table:table-cell table:formula="of:=[.O25]/([.$B$13]*10^(-9))" office:value-type="float" office:value="582568.267489856" calcext:value-type="float">
              <text:p>582568,267489856</text:p>
            </table:table-cell>
            <table:table-cell/>
          </table:table-row>
          <table:table-row table:style-name="ro1">
            <table:table-cell table:number-columns-repeated="12"/>
            <table:table-cell office:value-type="float" office:value="40" calcext:value-type="float">
              <text:p>40</text:p>
            </table:table-cell>
            <table:table-cell office:value-type="float" office:value="18.76" calcext:value-type="float">
              <text:p>18,76</text:p>
            </table:table-cell>
            <table:table-cell table:formula="of:=-(SIN(3.14/180*[.N26])-SIN(3.14/180*[.M26]))" office:value-type="float" office:value="0.321068893728363" calcext:value-type="float">
              <text:p>0,321068893728363</text:p>
            </table:table-cell>
            <table:table-cell table:formula="of:=[.O26]/([.$B$13]*10^(-9))" office:value-type="float" office:value="587930.587307018" calcext:value-type="float">
              <text:p>587930,587307018</text:p>
            </table:table-cell>
            <table:table-cell/>
          </table:table-row>
        </table:table-row-group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26.56" calcext:value-type="float">
            <text:p>26,56</text:p>
          </table:table-cell>
          <table:table-cell table:formula="of:=-(SIN(3.14/180*[.N27])-SIN(3.14/180*[.M27]))" office:value-type="float" office:value="0.318835471511551" calcext:value-type="float">
            <text:p>0,318835471511551</text:p>
          </table:table-cell>
          <table:table-cell table:formula="of:=[.O27]/([.$B$13]*10^(-9))" office:value-type="float" office:value="583840.81946814" calcext:value-type="float">
            <text:p>583840,8194681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32.92" calcext:value-type="float">
            <text:p>32,92</text:p>
          </table:table-cell>
          <table:table-cell table:formula="of:=-(SIN(3.14/180*[.N28])-SIN(3.14/180*[.M28]))" office:value-type="float" office:value="0.322536871163414" calcext:value-type="float">
            <text:p>0,322536871163414</text:p>
          </table:table-cell>
          <table:table-cell table:formula="of:=[.O28]/([.$B$13]*10^(-9))" office:value-type="float" office:value="590618.698339891" calcext:value-type="float">
            <text:p>590618,6983398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1:51:35.348164419</meta:creation-date>
    <dc:date>2026-01-08T22:09:30.380273906</dc:date>
    <meta:editing-duration>PT1H11M36S</meta:editing-duration>
    <meta:editing-cycles>4</meta:editing-cycles>
    <meta:generator>LibreOffice/24.2.7.2$Linux_X86_64 LibreOffice_project/420$Build-2</meta:generator>
    <meta:document-statistic meta:table-count="1" meta:cell-count="142" meta:object-count="0"/>
  </office:meta>
</office:document-meta>
</file>