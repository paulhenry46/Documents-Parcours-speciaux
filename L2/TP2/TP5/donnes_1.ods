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float" office:value="-0.05" calcext:value-type="float">
            <text:p>-0,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1] &amp; &quot; ± &quot; &amp; [.C1]" office:value-type="string" office:string-value="-0,05 ± 0,00058" calcext:value-type="string">
            <text:p>-0,05 ± 0,00058</text:p>
          </table:table-cell>
          <table:table-cell table:formula="of:= [.B1] &amp; &quot; ± &quot; &amp; [.D1]" office:value-type="string" office:string-value="0,0004 ± 0,0000058" calcext:value-type="string">
            <text:p>0,0004 ± 0,0000058</text:p>
          </table:table-cell>
          <table:table-cell table:number-columns-repeated="4"/>
          <table:table-cell office:value-type="string" calcext:value-type="string">
            <text:p>-0,05 ± 0,00058</text:p>
          </table:table-cell>
          <table:table-cell office:value-type="string" calcext:value-type="string">
            <text:p>0,0004 ± 0,0000058</text:p>
          </table:table-cell>
        </table:table-row>
        <table:table-row table:style-name="ro1">
          <table:table-cell office:value-type="float" office:value="-0.04" calcext:value-type="float">
            <text:p>-0,04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2] &amp; &quot; ± &quot; &amp; [.C2]" office:value-type="string" office:string-value="-0,04 ± 0,00058" calcext:value-type="string">
            <text:p>-0,04 ± 0,00058</text:p>
          </table:table-cell>
          <table:table-cell table:formula="of:= [.B2] &amp; &quot; ± &quot; &amp; [.D2]" office:value-type="string" office:string-value="0,00053 ± 0,0000058" calcext:value-type="string">
            <text:p>0,00053 ± 0,0000058</text:p>
          </table:table-cell>
          <table:table-cell table:number-columns-repeated="4"/>
          <table:table-cell office:value-type="string" calcext:value-type="string">
            <text:p>-0,04 ± 0,00058</text:p>
          </table:table-cell>
          <table:table-cell office:value-type="string" calcext:value-type="string">
            <text:p>0,00053 ± 0,0000058</text:p>
          </table:table-cell>
        </table:table-row>
        <table:table-row table:style-name="ro1">
          <table:table-cell office:value-type="float" office:value="-0.03" calcext:value-type="float">
            <text:p>-0,03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3] &amp; &quot; ± &quot; &amp; [.C3]" office:value-type="string" office:string-value="-0,03 ± 0,00058" calcext:value-type="string">
            <text:p>-0,03 ± 0,00058</text:p>
          </table:table-cell>
          <table:table-cell table:formula="of:= [.B3] &amp; &quot; ± &quot; &amp; [.D3]" office:value-type="string" office:string-value="0,00068 ± 0,0000058" calcext:value-type="string">
            <text:p>0,00068 ± 0,0000058</text:p>
          </table:table-cell>
          <table:table-cell table:number-columns-repeated="4"/>
          <table:table-cell office:value-type="string" calcext:value-type="string">
            <text:p>-0,03 ± 0,00058</text:p>
          </table:table-cell>
          <table:table-cell office:value-type="string" calcext:value-type="string">
            <text:p>0,00068 ± 0,0000058</text:p>
          </table:table-cell>
        </table:table-row>
        <table:table-row table:style-name="ro1">
          <table:table-cell office:value-type="float" office:value="-0.02" calcext:value-type="float">
            <text:p>-0,02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4] &amp; &quot; ± &quot; &amp; [.C4]" office:value-type="string" office:string-value="-0,02 ± 0,00058" calcext:value-type="string">
            <text:p>-0,02 ± 0,00058</text:p>
          </table:table-cell>
          <table:table-cell table:formula="of:= [.B4] &amp; &quot; ± &quot; &amp; [.D4]" office:value-type="string" office:string-value="0,00085 ± 0,0000058" calcext:value-type="string">
            <text:p>0,00085 ± 0,0000058</text:p>
          </table:table-cell>
          <table:table-cell table:number-columns-repeated="4"/>
          <table:table-cell office:value-type="string" calcext:value-type="string">
            <text:p>-0,02 ± 0,00058</text:p>
          </table:table-cell>
          <table:table-cell office:value-type="string" calcext:value-type="string">
            <text:p>0,00085 ± 0,0000058</text:p>
          </table:table-cell>
        </table:table-row>
        <table:table-row table:style-name="ro1">
          <table:table-cell office:value-type="float" office:value="-0.01" calcext:value-type="float">
            <text:p>-0,01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5] &amp; &quot; ± &quot; &amp; [.C5]" office:value-type="string" office:string-value="-0,01 ± 0,00058" calcext:value-type="string">
            <text:p>-0,01 ± 0,00058</text:p>
          </table:table-cell>
          <table:table-cell table:formula="of:= [.B5] &amp; &quot; ± &quot; &amp; [.D5]" office:value-type="string" office:string-value="0,00106 ± 0,0000058" calcext:value-type="string">
            <text:p>0,00106 ± 0,0000058</text:p>
          </table:table-cell>
          <table:table-cell table:number-columns-repeated="4"/>
          <table:table-cell office:value-type="string" calcext:value-type="string">
            <text:p>-0,01 ± 0,00058</text:p>
          </table:table-cell>
          <table:table-cell office:value-type="string" calcext:value-type="string">
            <text:p>0,00106 ± 0,0000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6] &amp; &quot; ± &quot; &amp; [.C6]" office:value-type="string" office:string-value="0 ± 0,00058" calcext:value-type="string">
            <text:p>0 ± 0,00058</text:p>
          </table:table-cell>
          <table:table-cell table:formula="of:= [.B6] &amp; &quot; ± &quot; &amp; [.D6]" office:value-type="string" office:string-value="0,00122 ± 0,0000058" calcext:value-type="string">
            <text:p>0,00122 ± 0,0000058</text:p>
          </table:table-cell>
          <table:table-cell table:number-columns-repeated="4"/>
          <table:table-cell office:value-type="string" calcext:value-type="string">
            <text:p>0 ± 0,00058</text:p>
          </table:table-cell>
          <table:table-cell office:value-type="string" calcext:value-type="string">
            <text:p>0,00122 ± 0,000005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7] &amp; &quot; ± &quot; &amp; [.C7]" office:value-type="string" office:string-value="0,01 ± 0,00058" calcext:value-type="string">
            <text:p>0,01 ± 0,00058</text:p>
          </table:table-cell>
          <table:table-cell table:formula="of:= [.B7] &amp; &quot; ± &quot; &amp; [.D7]" office:value-type="string" office:string-value="0,00136 ± 0,0000058" calcext:value-type="string">
            <text:p>0,00136 ± 0,0000058</text:p>
          </table:table-cell>
          <table:table-cell table:number-columns-repeated="4"/>
          <table:table-cell office:value-type="string" calcext:value-type="string">
            <text:p>0,01 ± 0,00058</text:p>
          </table:table-cell>
          <table:table-cell office:value-type="string" calcext:value-type="string">
            <text:p>0,00136 ± 0,0000058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8] &amp; &quot; ± &quot; &amp; [.C8]" office:value-type="string" office:string-value="0,02 ± 0,00058" calcext:value-type="string">
            <text:p>0,02 ± 0,00058</text:p>
          </table:table-cell>
          <table:table-cell table:formula="of:= [.B8] &amp; &quot; ± &quot; &amp; [.D8]" office:value-type="string" office:string-value="0,0014 ± 0,0000058" calcext:value-type="string">
            <text:p>0,0014 ± 0,0000058</text:p>
          </table:table-cell>
          <table:table-cell table:number-columns-repeated="4"/>
          <table:table-cell office:value-type="string" calcext:value-type="string">
            <text:p>0,02 ± 0,00058</text:p>
          </table:table-cell>
          <table:table-cell office:value-type="string" calcext:value-type="string">
            <text:p>0,0014 ± 0,0000058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0131" calcext:value-type="float">
            <text:p>0,00131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9] &amp; &quot; ± &quot; &amp; [.C9]" office:value-type="string" office:string-value="0,03 ± 0,00058" calcext:value-type="string">
            <text:p>0,03 ± 0,00058</text:p>
          </table:table-cell>
          <table:table-cell table:formula="of:= [.B9] &amp; &quot; ± &quot; &amp; [.D9]" office:value-type="string" office:string-value="0,00131 ± 0,0000058" calcext:value-type="string">
            <text:p>0,00131 ± 0,0000058</text:p>
          </table:table-cell>
          <table:table-cell table:number-columns-repeated="4"/>
          <table:table-cell office:value-type="string" calcext:value-type="string">
            <text:p>0,03 ± 0,00058</text:p>
          </table:table-cell>
          <table:table-cell office:value-type="string" calcext:value-type="string">
            <text:p>0,00131 ± 0,0000058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10] &amp; &quot; ± &quot; &amp; [.C10]" office:value-type="string" office:string-value="0,04 ± 0,00058" calcext:value-type="string">
            <text:p>0,04 ± 0,00058</text:p>
          </table:table-cell>
          <table:table-cell table:formula="of:= [.B10] &amp; &quot; ± &quot; &amp; [.D10]" office:value-type="string" office:string-value="0,00117 ± 0,0000058" calcext:value-type="string">
            <text:p>0,00117 ± 0,0000058</text:p>
          </table:table-cell>
          <table:table-cell table:number-columns-repeated="4"/>
          <table:table-cell office:value-type="string" calcext:value-type="string">
            <text:p>0,04 ± 0,00058</text:p>
          </table:table-cell>
          <table:table-cell office:value-type="string" calcext:value-type="string">
            <text:p>0,00117 ± 0,000005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11] &amp; &quot; ± &quot; &amp; [.C11]" office:value-type="string" office:string-value="0,05 ± 0,00058" calcext:value-type="string">
            <text:p>0,05 ± 0,00058</text:p>
          </table:table-cell>
          <table:table-cell table:formula="of:= [.B11] &amp; &quot; ± &quot; &amp; [.D11]" office:value-type="string" office:string-value="0,00099 ± 0,0000058" calcext:value-type="string">
            <text:p>0,00099 ± 0,0000058</text:p>
          </table:table-cell>
          <table:table-cell table:number-columns-repeated="4"/>
          <table:table-cell office:value-type="string" calcext:value-type="string">
            <text:p>0,05 ± 0,00058</text:p>
          </table:table-cell>
          <table:table-cell office:value-type="string" calcext:value-type="string">
            <text:p>0,00099 ± 0,0000058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12] &amp; &quot; ± &quot; &amp; [.C12]" office:value-type="string" office:string-value="0,06 ± 0,00058" calcext:value-type="string">
            <text:p>0,06 ± 0,00058</text:p>
          </table:table-cell>
          <table:table-cell table:formula="of:= [.B12] &amp; &quot; ± &quot; &amp; [.D12]" office:value-type="string" office:string-value="0,0008 ± 0,0000058" calcext:value-type="string">
            <text:p>0,0008 ± 0,0000058</text:p>
          </table:table-cell>
          <table:table-cell table:number-columns-repeated="4"/>
          <table:table-cell office:value-type="string" calcext:value-type="string">
            <text:p>0,06 ± 0,00058</text:p>
          </table:table-cell>
          <table:table-cell office:value-type="string" calcext:value-type="string">
            <text:p>0,0008 ± 0,0000058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13] &amp; &quot; ± &quot; &amp; [.C13]" office:value-type="string" office:string-value="0,07 ± 0,00058" calcext:value-type="string">
            <text:p>0,07 ± 0,00058</text:p>
          </table:table-cell>
          <table:table-cell table:formula="of:= [.B13] &amp; &quot; ± &quot; &amp; [.D13]" office:value-type="string" office:string-value="0,00063 ± 0,0000058" calcext:value-type="string">
            <text:p>0,00063 ± 0,0000058</text:p>
          </table:table-cell>
          <table:table-cell table:number-columns-repeated="4"/>
          <table:table-cell office:value-type="string" calcext:value-type="string">
            <text:p>0,07 ± 0,00058</text:p>
          </table:table-cell>
          <table:table-cell office:value-type="string" calcext:value-type="string">
            <text:p>0,00063 ± 0,0000058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14] &amp; &quot; ± &quot; &amp; [.C14]" office:value-type="string" office:string-value="0,08 ± 0,00058" calcext:value-type="string">
            <text:p>0,08 ± 0,00058</text:p>
          </table:table-cell>
          <table:table-cell table:formula="of:= [.B14] &amp; &quot; ± &quot; &amp; [.D14]" office:value-type="string" office:string-value="0,00049 ± 0,0000058" calcext:value-type="string">
            <text:p>0,00049 ± 0,0000058</text:p>
          </table:table-cell>
          <table:table-cell table:number-columns-repeated="4"/>
          <table:table-cell office:value-type="string" calcext:value-type="string">
            <text:p>0,08 ± 0,00058</text:p>
          </table:table-cell>
          <table:table-cell office:value-type="string" calcext:value-type="string">
            <text:p>0,00049 ± 0,0000058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15] &amp; &quot; ± &quot; &amp; [.C15]" office:value-type="string" office:string-value="0,09 ± 0,00058" calcext:value-type="string">
            <text:p>0,09 ± 0,00058</text:p>
          </table:table-cell>
          <table:table-cell table:formula="of:= [.B15] &amp; &quot; ± &quot; &amp; [.D15]" office:value-type="string" office:string-value="0,00038 ± 0,0000058" calcext:value-type="string">
            <text:p>0,00038 ± 0,0000058</text:p>
          </table:table-cell>
          <table:table-cell table:number-columns-repeated="4"/>
          <table:table-cell office:value-type="string" calcext:value-type="string">
            <text:p>0,09 ± 0,00058</text:p>
          </table:table-cell>
          <table:table-cell office:value-type="string" calcext:value-type="string">
            <text:p>0,00038 ± 0,000005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58" calcext:value-type="float">
            <text:p>5,80E-06</text:p>
          </table:table-cell>
          <table:table-cell/>
          <table:table-cell table:formula="of:= [.A16] &amp; &quot; ± &quot; &amp; [.C16]" office:value-type="string" office:string-value="0,1 ± 0,00058" calcext:value-type="string">
            <text:p>0,1 ± 0,00058</text:p>
          </table:table-cell>
          <table:table-cell table:formula="of:= [.B16] &amp; &quot; ± &quot; &amp; [.D16]" office:value-type="string" office:string-value="0,00027 ± 0,0000058" calcext:value-type="string">
            <text:p>0,00027 ± 0,0000058</text:p>
          </table:table-cell>
          <table:table-cell table:number-columns-repeated="4"/>
          <table:table-cell office:value-type="string" calcext:value-type="string">
            <text:p>0,1 ± 0,00058</text:p>
          </table:table-cell>
          <table:table-cell office:value-type="string" calcext:value-type="string">
            <text:p>0,00027 ± 0,0000058</text:p>
          </table:table-cell>
        </table:table-row>
        <table:table-row table:style-name="ro1">
          <table:table-cell table:number-columns-repeated="3"/>
          <table:table-cell office:value-type="float" office:value="0.0000058" calcext:value-type="float">
            <text:p>5,80E-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0058" calcext:value-type="float">
            <text:p>5,80E-0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8:33:29.334736186</meta:creation-date>
    <dc:date>2025-11-14T21:28:29.599640477</dc:date>
    <meta:editing-duration>PT2H33M45S</meta:editing-duration>
    <meta:editing-cycles>2</meta:editing-cycles>
    <meta:generator>LibreOffice/24.2.7.2$Linux_X86_64 LibreOffice_project/420$Build-2</meta:generator>
    <meta:document-statistic meta:table-count="1" meta:cell-count="130" meta:object-count="0"/>
  </office:meta>
</office:document-meta>
</file>