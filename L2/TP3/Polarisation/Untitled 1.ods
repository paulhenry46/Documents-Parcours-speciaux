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Tension U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formula="of:=([.B2]-0.00982)/(4.05-0.00982)" office:value-type="float" office:value="0.51734823695974" calcext:value-type="float">
            <text:p>0,5173482369597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4" calcext:value-type="float">
            <text:p>0,94</text:p>
          </table:table-cell>
          <table:table-cell table:formula="of:=([.B3]-0.00982)/(4.05-0.00982)" office:value-type="float" office:value="0.230232316381943" calcext:value-type="float">
            <text:p>0,23023231638194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0.08122" calcext:value-type="float">
            <text:p>8,12E-02</text:p>
          </table:table-cell>
          <table:table-cell table:formula="of:=([.B4]-0.00982)/(4.05-0.00982)" office:value-type="float" office:value="0.0176724799390126" calcext:value-type="float">
            <text:p>0,017672479939012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0.02156" calcext:value-type="float">
            <text:p>2,16E-02</text:p>
          </table:table-cell>
          <table:table-cell table:formula="of:=([.B5]-0.00982)/(4.05-0.00982)" office:value-type="float" office:value="0.00290581112722701" calcext:value-type="float">
            <text:p>0,0029058111272270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0.0106" calcext:value-type="float">
            <text:p>1,06E-02</text:p>
          </table:table-cell>
          <table:table-cell table:formula="of:=([.B6]-0.00982)/(4.05-0.00982)" office:value-type="float" office:value="0.000193060705216104" calcext:value-type="float">
            <text:p>0,00019306070521610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145" calcext:value-type="float">
            <text:p>1,45E-02</text:p>
          </table:table-cell>
          <table:table-cell table:formula="of:=([.B7]-0.00982)/(4.05-0.00982)" office:value-type="float" office:value="0.00115836423129663" calcext:value-type="float">
            <text:p>0,00115836423129663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0.05576" calcext:value-type="float">
            <text:p>5,58E-02</text:p>
          </table:table-cell>
          <table:table-cell table:formula="of:=([.B8]-0.00982)/(4.05-0.00982)" office:value-type="float" office:value="0.0113707805097793" calcext:value-type="float">
            <text:p>0,0113707805097793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8" calcext:value-type="float">
            <text:p>0,18</text:p>
          </table:table-cell>
          <table:table-cell table:formula="of:=([.B9]-0.00982)/(4.05-0.00982)" office:value-type="float" office:value="0.0421218856585598" calcext:value-type="float">
            <text:p>0,0421218856585598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9" calcext:value-type="float">
            <text:p>1,09</text:p>
          </table:table-cell>
          <table:table-cell table:formula="of:=([.B10]-0.00982)/(4.05-0.00982)" office:value-type="float" office:value="0.267359375077348" calcext:value-type="float">
            <text:p>0,267359375077348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6" calcext:value-type="float">
            <text:p>2,56</text:p>
          </table:table-cell>
          <table:table-cell table:formula="of:=([.B11]-0.00982)/(4.05-0.00982)" office:value-type="float" office:value="0.631204550292314" calcext:value-type="float">
            <text:p>0,631204550292314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28" calcext:value-type="float">
            <text:p>3,28</text:p>
          </table:table-cell>
          <table:table-cell table:formula="of:=([.B12]-0.00982)/(4.05-0.00982)" office:value-type="float" office:value="0.809414432030256" calcext:value-type="float">
            <text:p>0,809414432030256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.4" calcext:value-type="float">
            <text:p>3,4</text:p>
          </table:table-cell>
          <table:table-cell table:style-name="ce3" table:formula="of:=([.B13]-0.00982)/(4.05-0.00982)" office:value-type="float" office:value="0.83911607898658" calcext:value-type="float">
            <text:p>0,83911607898658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9" calcext:value-type="float">
            <text:p>3,9</text:p>
          </table:table-cell>
          <table:table-cell table:style-name="ce3" table:formula="of:=([.B14]-0.00982)/(4.05-0.00982)" office:value-type="float" office:value="0.962872941304595" calcext:value-type="float">
            <text:p>0,962872941304595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8" calcext:value-type="float">
            <text:p>3,8</text:p>
          </table:table-cell>
          <table:table-cell table:formula="of:=([.B15]-0.00982)/(4.05-0.00982)" office:value-type="float" office:value="0.938121568840992" calcext:value-type="float">
            <text:p>0,938121568840992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95" calcext:value-type="float">
            <text:p>2,95</text:p>
          </table:table-cell>
          <table:table-cell table:formula="of:=([.B16]-0.00982)/(4.05-0.00982)" office:value-type="float" office:value="0.727734902900366" calcext:value-type="float">
            <text:p>0,727734902900366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88" calcext:value-type="float">
            <text:p>1,88</text:p>
          </table:table-cell>
          <table:table-cell table:formula="of:=([.B17]-0.00982)/(4.05-0.00982)" office:value-type="float" office:value="0.462895217539813" calcext:value-type="float">
            <text:p>0,462895217539813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,75</text:p>
          </table:table-cell>
          <table:table-cell table:formula="of:=([.B18]-0.00982)/(4.05-0.00982)" office:value-type="float" office:value="0.183204708701097" calcext:value-type="float">
            <text:p>0,183204708701097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" office:value-type="float" office:value="0.077" calcext:value-type="float">
            <text:p>7,70E-02</text:p>
          </table:table-cell>
          <table:table-cell table:formula="of:=([.B19]-0.00982)/(4.05-0.00982)" office:value-type="float" office:value="0.0166279720210486" calcext:value-type="float">
            <text:p>0,0166279720210486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 office:value-type="float" office:value="0.0185" calcext:value-type="float">
            <text:p>1,85E-02</text:p>
          </table:table-cell>
          <table:table-cell table:formula="of:=([.B20]-0.00982)/(4.05-0.00982)" office:value-type="float" office:value="0.00214841912984075" calcext:value-type="float">
            <text:p>0,00214841912984075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 office:value-type="float" office:value="0.00982" calcext:value-type="float">
            <text:p>9,82E-03</text:p>
          </table:table-cell>
          <table:table-cell table:formula="of:=([.B21]-0.00982)/(4.05-0.00982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" office:value-type="float" office:value="0.01543" calcext:value-type="float">
            <text:p>1,54E-02</text:p>
          </table:table-cell>
          <table:table-cell table:formula="of:=([.B22]-0.00982)/(4.05-0.00982)" office:value-type="float" office:value="0.00138855199520813" calcext:value-type="float">
            <text:p>0,00138855199520813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" office:value-type="float" office:value="0.0765" calcext:value-type="float">
            <text:p>7,65E-02</text:p>
          </table:table-cell>
          <table:table-cell table:formula="of:=([.B23]-0.00982)/(4.05-0.00982)" office:value-type="float" office:value="0.0165042151587306" calcext:value-type="float">
            <text:p>0,0165042151587306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7" calcext:value-type="float">
            <text:p>0,17</text:p>
          </table:table-cell>
          <table:table-cell table:formula="of:=([.B24]-0.00982)/(4.05-0.00982)" office:value-type="float" office:value="0.0396467484121995" calcext:value-type="float">
            <text:p>0,0396467484121995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15" calcext:value-type="float">
            <text:p>1,15</text:p>
          </table:table-cell>
          <table:table-cell table:formula="of:=([.B25]-0.00982)/(4.05-0.00982)" office:value-type="float" office:value="0.28221019855551" calcext:value-type="float">
            <text:p>0,28221019855551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15" calcext:value-type="float">
            <text:p>2,15</text:p>
          </table:table-cell>
          <table:table-cell table:formula="of:=([.B26]-0.00982)/(4.05-0.00982)" office:value-type="float" office:value="0.529723923191541" calcext:value-type="float">
            <text:p>0,529723923191541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31" calcext:value-type="float">
            <text:p>3,31</text:p>
          </table:table-cell>
          <table:table-cell table:formula="of:=([.B27]-0.00982)/(4.05-0.00982)" office:value-type="float" office:value="0.816839843769337" calcext:value-type="float">
            <text:p>0,816839843769337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75" calcext:value-type="float">
            <text:p>3,75</text:p>
          </table:table-cell>
          <table:table-cell table:formula="of:=([.B28]-0.00982)/(4.05-0.00982)" office:value-type="float" office:value="0.925745882609191" calcext:value-type="float">
            <text:p>0,925745882609191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81" calcext:value-type="float">
            <text:p>3,81</text:p>
          </table:table-cell>
          <table:table-cell table:formula="of:=([.B29]-0.00982)/(4.05-0.00982)" office:value-type="float" office:value="0.940596706087353" calcext:value-type="float">
            <text:p>0,940596706087353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41" calcext:value-type="float">
            <text:p>3,41</text:p>
          </table:table-cell>
          <table:table-cell table:formula="of:=([.B30]-0.00982)/(4.05-0.00982)" office:value-type="float" office:value="0.84159121623294" calcext:value-type="float">
            <text:p>0,84159121623294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14" calcext:value-type="float">
            <text:p>3,14</text:p>
          </table:table-cell>
          <table:table-cell table:formula="of:=([.B31]-0.00982)/(4.05-0.00982)" office:value-type="float" office:value="0.774762510581212" calcext:value-type="float">
            <text:p>0,774762510581212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3" office:value-type="float" office:value="2.8" calcext:value-type="float">
            <text:p>2,8</text:p>
          </table:table-cell>
          <table:table-cell table:formula="of:=([.B32]-0.00982)/(4.05-0.00982)" office:value-type="float" office:value="0.690607844204961" calcext:value-type="float">
            <text:p>0,690607844204961</text:p>
          </table:table-cell>
          <table:table-cell table:number-columns-repeated="7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het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51734823695974" calcext:value-type="float">
            <text:p>0,51734823695974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230232316381943" calcext:value-type="float">
            <text:p>0,230232316381943</text:p>
          </table:table-cell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0.0176724799390126" calcext:value-type="float">
            <text:p>0,0176724799390126</text:p>
          </table:table-cell>
        </table:table-row>
        <table:table-row table:style-name="ro1"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0.00290581112722701" calcext:value-type="float">
            <text:p>0,00290581112722701</text:p>
          </table:table-cell>
        </table:table-row>
        <table:table-row table:style-name="ro1">
          <table:table-cell table:number-columns-repeated="8"/>
          <table:table-cell office:value-type="float" office:value="47" calcext:value-type="float">
            <text:p>47</text:p>
          </table:table-cell>
          <table:table-cell office:value-type="float" office:value="0.000193060705216104" calcext:value-type="float">
            <text:p>0,000193060705216104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0.00115836423129663" calcext:value-type="float">
            <text:p>0,00115836423129663</text:p>
          </table:table-cell>
        </table:table-row>
        <table:table-row table:style-name="ro1"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0.0113707805097793" calcext:value-type="float">
            <text:p>0,0113707805097793</text:p>
          </table:table-cell>
        </table:table-row>
        <table:table-row table:style-name="ro1"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0.0421218856585598" calcext:value-type="float">
            <text:p>0,0421218856585598</text:p>
          </table:table-cell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0.267359375077348" calcext:value-type="float">
            <text:p>0,267359375077348</text:p>
          </table:table-cell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0.631204550292314" calcext:value-type="float">
            <text:p>0,631204550292314</text:p>
          </table:table-cell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0.809414432030256" calcext:value-type="float">
            <text:p>0,809414432030256</text:p>
          </table:table-cell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0.829215530001139" calcext:value-type="float">
            <text:p>0,829215530001139</text:p>
          </table:table-cell>
        </table:table-row>
        <table:table-row table:style-name="ro1"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0.992574588260919" calcext:value-type="float">
            <text:p>0,992574588260919</text:p>
          </table:table-cell>
        </table:table-row>
        <table:table-row table:style-name="ro1">
          <table:table-cell table:number-columns-repeated="8"/>
          <table:table-cell office:value-type="float" office:value="145" calcext:value-type="float">
            <text:p>145</text:p>
          </table:table-cell>
          <table:table-cell office:value-type="float" office:value="0.938121568840992" calcext:value-type="float">
            <text:p>0,938121568840992</text:p>
          </table:table-cell>
        </table:table-row>
        <table:table-row table:style-name="ro1"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0.727734902900366" calcext:value-type="float">
            <text:p>0,727734902900366</text:p>
          </table:table-cell>
        </table:table-row>
        <table:table-row table:style-name="ro1"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0.462895217539813" calcext:value-type="float">
            <text:p>0,462895217539813</text:p>
          </table:table-cell>
        </table:table-row>
        <table:table-row table:style-name="ro1"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0.183204708701097" calcext:value-type="float">
            <text:p>0,183204708701097</text:p>
          </table:table-cell>
        </table:table-row>
        <table:table-row table:style-name="ro1"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0.0166279720210486" calcext:value-type="float">
            <text:p>0,0166279720210486</text:p>
          </table:table-cell>
        </table:table-row>
        <table:table-row table:style-name="ro1">
          <table:table-cell table:number-columns-repeated="8"/>
          <table:table-cell office:value-type="float" office:value="225" calcext:value-type="float">
            <text:p>225</text:p>
          </table:table-cell>
          <table:table-cell office:value-type="float" office:value="0.00214841912984075" calcext:value-type="float">
            <text:p>0,00214841912984075</text:p>
          </table:table-cell>
        </table:table-row>
        <table:table-row table:style-name="ro1">
          <table:table-cell table:number-columns-repeated="8"/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230" calcext:value-type="float">
            <text:p>230</text:p>
          </table:table-cell>
          <table:table-cell office:value-type="float" office:value="0.00138855199520813" calcext:value-type="float">
            <text:p>0,00138855199520813</text:p>
          </table:table-cell>
        </table:table-row>
        <table:table-row table:style-name="ro1">
          <table:table-cell table:number-columns-repeated="8"/>
          <table:table-cell office:value-type="float" office:value="235" calcext:value-type="float">
            <text:p>235</text:p>
          </table:table-cell>
          <table:table-cell office:value-type="float" office:value="0.0165042151587306" calcext:value-type="float">
            <text:p>0,0165042151587306</text:p>
          </table:table-cell>
        </table:table-row>
        <table:table-row table:style-name="ro1">
          <table:table-cell table:number-columns-repeated="8"/>
          <table:table-cell office:value-type="float" office:value="240" calcext:value-type="float">
            <text:p>240</text:p>
          </table:table-cell>
          <table:table-cell office:value-type="float" office:value="0.0396467484121995" calcext:value-type="float">
            <text:p>0,0396467484121995</text:p>
          </table:table-cell>
        </table:table-row>
        <table:table-row table:style-name="ro1">
          <table:table-cell table:number-columns-repeated="8"/>
          <table:table-cell office:value-type="float" office:value="260" calcext:value-type="float">
            <text:p>260</text:p>
          </table:table-cell>
          <table:table-cell office:value-type="float" office:value="0.28221019855551" calcext:value-type="float">
            <text:p>0,28221019855551</text:p>
          </table:table-cell>
        </table:table-row>
        <table:table-row table:style-name="ro1">
          <table:table-cell table:number-columns-repeated="8"/>
          <table:table-cell office:value-type="float" office:value="280" calcext:value-type="float">
            <text:p>280</text:p>
          </table:table-cell>
          <table:table-cell office:value-type="float" office:value="0.529723923191541" calcext:value-type="float">
            <text:p>0,529723923191541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0.816839843769337" calcext:value-type="float">
            <text:p>0,816839843769337</text:p>
          </table:table-cell>
        </table:table-row>
        <table:table-row table:style-name="ro1">
          <table:table-cell table:number-columns-repeated="8"/>
          <table:table-cell office:value-type="float" office:value="315" calcext:value-type="float">
            <text:p>315</text:p>
          </table:table-cell>
          <table:table-cell office:value-type="float" office:value="0.925745882609191" calcext:value-type="float">
            <text:p>0,925745882609191</text:p>
          </table:table-cell>
        </table:table-row>
        <table:table-row table:style-name="ro1">
          <table:table-cell table:number-columns-repeated="8"/>
          <table:table-cell office:value-type="float" office:value="320" calcext:value-type="float">
            <text:p>320</text:p>
          </table:table-cell>
          <table:table-cell office:value-type="float" office:value="0.940596706087353" calcext:value-type="float">
            <text:p>0,940596706087353</text:p>
          </table:table-cell>
        </table:table-row>
        <table:table-row table:style-name="ro1">
          <table:table-cell table:number-columns-repeated="8"/>
          <table:table-cell office:value-type="float" office:value="325" calcext:value-type="float">
            <text:p>325</text:p>
          </table:table-cell>
          <table:table-cell office:value-type="float" office:value="0.84159121623294" calcext:value-type="float">
            <text:p>0,84159121623294</text:p>
          </table:table-cell>
        </table:table-row>
        <table:table-row table:style-name="ro1">
          <table:table-cell table:number-columns-repeated="8"/>
          <table:table-cell office:value-type="float" office:value="340" calcext:value-type="float">
            <text:p>340</text:p>
          </table:table-cell>
          <table:table-cell office:value-type="float" office:value="0.774762510581212" calcext:value-type="float">
            <text:p>0,774762510581212</text:p>
          </table:table-cell>
        </table:table-row>
        <table:table-row table:style-name="ro1"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0.75991168710305" calcext:value-type="float">
            <text:p>0,759911687103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 style:data-style-name="N2" text:time-value="18:57:18.8713521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4:16:47.807335805</meta:creation-date>
    <dc:date>2026-03-14T09:30:23.344000778</dc:date>
    <meta:editing-duration>PT14H41M5S</meta:editing-duration>
    <meta:editing-cycles>7</meta:editing-cycles>
    <meta:generator>LibreOffice/24.2.7.2$Linux_X86_64 LibreOffice_project/420$Build-2</meta:generator>
    <meta:document-statistic meta:table-count="1" meta:cell-count="160" meta:object-count="0"/>
  </office:meta>
</office:document-meta>
</file>