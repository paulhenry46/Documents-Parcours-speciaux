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V (cm³)</text:p>
          </table:table-cell>
          <table:table-cell office:value-type="string" calcext:value-type="string">
            <text:p>P (10⁵ Pa)</text:p>
          </table:table-cell>
          <table:table-cell/>
          <table:table-cell office:value-type="string" calcext:value-type="string">
            <text:p>eta</text:p>
          </table:table-cell>
        </table:table-row>
        <table:table-row table:style-name="ro1">
          <table:table-cell office:value-type="string" calcext:value-type="string">
            <text:p>V (cm³)</text:p>
          </table:table-cell>
          <table:table-cell office:value-type="string" calcext:value-type="string">
            <text:p>P (10⁵ P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t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z</text:p>
          </table:table-cell>
          <table:table-cell table:number-columns-repeated="8"/>
          <table:table-cell office:value-type="float" office:value="3.75" calcext:value-type="float">
            <text:p>3,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z</text:p>
          </table:table-cell>
          <table:table-cell table:number-columns-repeated="8"/>
          <table:table-cell office:value-type="float" office:value="3.5" calcext:value-type="float">
            <text:p>3,5</text:p>
          </table:table-cell>
          <table:table-cell office:value-type="float" office:value="15.25" calcext:value-type="float">
            <text:p>15,25</text:p>
          </table:table-cell>
          <table:table-cell/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5.25" calcext:value-type="float">
            <text:p>15,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z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float" office:value="3.25" calcext:value-type="float">
            <text:p>3,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z</text:p>
          </table:table-cell>
          <table:table-cell table:number-columns-repeated="3"/>
          <table:table-cell office:value-type="float" office:value="3.75" calcext:value-type="float">
            <text:p>3,7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.75" calcext:value-type="float">
            <text:p>2,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z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15.25" calcext:value-type="float">
            <text:p>15,25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9.5" calcext:value-type="float">
            <text:p>19,5</text:p>
          </table:table-cell>
          <table:table-cell/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9.5" calcext:value-type="float">
            <text:p>19,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z</text:p>
          </table:table-cell>
          <table:table-cell table:number-columns-repeated="3"/>
          <table:table-cell office:value-type="float" office:value="3.25" calcext:value-type="float">
            <text:p>3,2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25" calcext:value-type="float">
            <text:p>2,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z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,5</text:p>
          </table:table-cell>
          <table:table-cell/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,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z</text:p>
          </table:table-cell>
          <table:table-cell table:number-columns-repeated="3"/>
          <table:table-cell office:value-type="float" office:value="2.75" calcext:value-type="float">
            <text:p>2,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.75" calcext:value-type="float">
            <text:p>1,75</text:p>
          </table:table-cell>
          <table:table-cell office:value-type="float" office:value="23.5" calcext:value-type="float">
            <text:p>23,5</text:p>
          </table:table-cell>
          <table:table-cell/>
          <table:table-cell office:value-type="string" calcext:value-type="string">
            <text:p>liquide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3.5" calcext:value-type="float">
            <text:p>23,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quide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9.5" calcext:value-type="float">
            <text:p>19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3.5" calcext:value-type="float">
            <text:p>23,5</text:p>
          </table:table-cell>
          <table:table-cell/>
          <table:table-cell office:value-type="string" calcext:value-type="string">
            <text:p>liquide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3.5" calcext:value-type="float">
            <text:p>23,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quide</text:p>
          </table:table-cell>
          <table:table-cell table:number-columns-repeated="3"/>
          <table:table-cell office:value-type="float" office:value="2.25" calcext:value-type="float">
            <text:p>2,2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.25" calcext:value-type="float">
            <text:p>1,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iquide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quid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iqui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quide</text:p>
          </table:table-cell>
          <table:table-cell table:number-columns-repeated="3"/>
          <table:table-cell office:value-type="float" office:value="1.75" calcext:value-type="float">
            <text:p>1,75</text:p>
          </table:table-cell>
          <table:table-cell office:value-type="float" office:value="23.5" calcext:value-type="float">
            <text:p>23,5</text:p>
          </table:table-cell>
          <table:table-cell table:number-columns-repeated="3"/>
          <table:table-cell office:value-type="float" office:value="0.75" calcext:value-type="float">
            <text:p>0,75</text:p>
          </table:table-cell>
          <table:table-cell office:value-type="float" office:value="24.5" calcext:value-type="float">
            <text:p>24,5</text:p>
          </table:table-cell>
          <table:table-cell/>
          <table:table-cell office:value-type="string" calcext:value-type="string">
            <text:p>liquide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4.5" calcext:value-type="float">
            <text:p>24,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quide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3.5" calcext:value-type="float">
            <text:p>23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iquide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liquide</text:p>
          </table:table-cell>
          <table:table-cell table:number-columns-repeated="3"/>
          <table:table-cell office:value-type="float" office:value="1.25" calcext:value-type="float">
            <text:p>1,2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35" calcext:value-type="float">
            <text:p>0,3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iquide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qui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75" calcext:value-type="float">
            <text:p>0,75</text:p>
          </table:table-cell>
          <table:table-cell office:value-type="float" office:value="24.5" calcext:value-type="float">
            <text:p>24,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35" calcext:value-type="float">
            <text:p>0,35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 (cm³)</text:p>
          </table:table-cell>
          <table:table-cell office:value-type="string" calcext:value-type="string">
            <text:p>P (10⁵ Pa)</text:p>
          </table:table-cell>
          <table:table-cell office:value-type="string" calcext:value-type="string">
            <text:p>T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gaz</text:p>
          </table:table-cell>
          <table:table-cell table:number-columns-repeated="13"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az</text:p>
          </table:table-cell>
          <table:table-cell table:number-columns-repeated="1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az</text:p>
          </table:table-cell>
          <table:table-cell table:number-columns-repeated="13"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3.25" calcext:value-type="float">
            <text:p>23,25</text:p>
          </table:table-cell>
          <table:table-cell office:value-type="string" calcext:value-type="string">
            <text:p>eau (à peine)</text:p>
          </table:table-cell>
          <table:table-cell table:number-columns-repeated="1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3.25" calcext:value-type="float">
            <text:p>23,25</text:p>
          </table:table-cell>
          <table:table-cell office:value-type="string" calcext:value-type="string">
            <text:p>eau (plus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ésence de fluide liquide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.75" calcext:value-type="float">
            <text:p>3,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.5" calcext:value-type="float">
            <text:p>3,5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.25" calcext:value-type="float">
            <text:p>3,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.75" calcext:value-type="float">
            <text:p>2,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.5" calcext:value-type="float">
            <text:p>2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.25" calcext:value-type="float">
            <text:p>2,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95" calcext:value-type="float">
            <text:p>1,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9" calcext:value-type="float">
            <text:p>1,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85" calcext:value-type="float">
            <text:p>1,85</text:p>
          </table:table-cell>
          <table:table-cell office:value-type="float" office:value="23.25" calcext:value-type="float">
            <text:p>23,25</text:p>
          </table:table-cell>
          <table:table-cell office:value-type="string" calcext:value-type="string">
            <text:p>Oui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8" calcext:value-type="float">
            <text:p>1,8</text:p>
          </table:table-cell>
          <table:table-cell office:value-type="float" office:value="23.25" calcext:value-type="float">
            <text:p>23,25</text:p>
          </table:table-cell>
          <table:table-cell office:value-type="string" calcext:value-type="string">
            <text:p>Oui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75" calcext:value-type="float">
            <text:p>1,75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Oui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5" calcext:value-type="float">
            <text:p>1,5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Oui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25" calcext:value-type="float">
            <text:p>1,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i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i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75" calcext:value-type="float">
            <text:p>0,75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Oui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35" calcext:value-type="float">
            <text:p>0,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ui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string" calcext:value-type="string">
            <text:p><text:s/>Effet augmentation de la température</text:p>
          </table:table-cell>
          <table:table-cell table:number-columns-repeated="2"/>
          <table:table-cell office:value-type="string" calcext:value-type="string">
            <text:p>T=30,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(cm³)</text:p>
          </table:table-cell>
          <table:table-cell office:value-type="string" calcext:value-type="string">
            <text:p>P (10⁵ Pa)</text:p>
          </table:table-cell>
          <table:table-cell office:value-type="string" calcext:value-type="string">
            <text:p>Présence de fluide à l’état liquide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i</text:p>
          </table:table-cell>
          <table:table-cell table:number-columns-repeated="1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Oui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i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us de gaz</text:p>
          </table:table-cell>
          <table:table-cell table:number-columns-repeated="1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 calcext:value-type="string">
            <text:p>Tracer p et T verticalemen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1:00:39.385423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3:51:37.357239212</meta:creation-date>
    <dc:date>2026-02-13T13:35:31.062694092</dc:date>
    <meta:editing-duration>PT3H29M3S</meta:editing-duration>
    <meta:editing-cycles>11</meta:editing-cycles>
    <meta:generator>LibreOffice/24.2.7.2$Linux_X86_64 LibreOffice_project/420$Build-2</meta:generator>
    <meta:document-statistic meta:table-count="1" meta:cell-count="290" meta:object-count="0"/>
  </office:meta>
</office:document-meta>
</file>