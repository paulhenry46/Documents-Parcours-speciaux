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89cm"/>
    </style:style>
    <style:style style:name="co2" style:family="table-column">
      <style:table-column-properties fo:break-before="auto" style:column-width="35.2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Caractérisation d'un SEV</text:p>
          </table:table-cell>
          <table:table-cell office:value-type="string" calcext:value-type="string">
            <text:p>F est un sev s'il contient le vecteur nul et s'il est fermé par addition et multiplication par un scalaire. </text:p>
          </table:table-cell>
        </table:table-row>
        <table:table-row table:style-name="ro1">
          <table:table-cell office:value-type="string" calcext:value-type="string">
            <text:p>Ensembles particuliers</text:p>
          </table:table-cell>
          <table:table-cell office:value-type="string" calcext:value-type="string">
            <text:p>\(F\cap G\) est un sev de E. <text:s/>\(F\cup G\) n'est pas un sev de E <text:s/>Le complémentaire \(E\setminus F\) n'est pas un sev </text:p>
          </table:table-cell>
        </table:table-row>
        <table:table-row table:style-name="ro1">
          <table:table-cell office:value-type="string" calcext:value-type="string">
            <text:p>Famille génératrice</text:p>
          </table:table-cell>
          <table:table-cell office:value-type="string" calcext:value-type="string">
            <text:p>Une famille \((v_1,v_2,\dots,v_n)\) est génératrice \(\iff \forall x\in E, \exists \lambda_1,\dots,\lambda_n\), tels que \(x = \lambda_1 v_1*\lambda_2v_2+\dots+\lambda_p v_p\) </text:p>
          </table:table-cell>
        </table:table-row>
        <table:table-row table:style-name="ro1">
          <table:table-cell office:value-type="string" calcext:value-type="string">
            <text:p>Famille libre</text:p>
          </table:table-cell>
          <table:table-cell office:value-type="string" calcext:value-type="string">
            <text:p>Une famille \((v_1,v_2,\dots,v_n)\) est libre \(\iff \lambda_1 v_1+\dots+\lambda_n v_n = 0 \Rightarrow \lambda_1=\dots=\lambda_n =0\) </text:p>
          </table:table-cell>
        </table:table-row>
        <table:table-row table:style-name="ro1">
          <table:table-cell office:value-type="string" calcext:value-type="string">
            <text:p>Caractérisation d'une famille libre</text:p>
          </table:table-cell>
          <table:table-cell office:value-type="string" calcext:value-type="string">
            <text:p>Une famille \((v_1,v_2,\dots,v_n)\) est libre \(\iff\) aucun des vecteurs n'appartient à l'espace engendré par les autres. </text:p>
          </table:table-cell>
        </table:table-row>
        <table:table-row table:style-name="ro1">
          <table:table-cell office:value-type="string" calcext:value-type="string">
            <text:p>Décomposition d'un vecteur sur une famille</text:p>
          </table:table-cell>
          <table:table-cell office:value-type="string" calcext:value-type="string">
            <text:p>Soit \((v_1,v_2,\dots,v_n)\) une famille libre et x un vecteur quelconque de l’espace engendré par les vecteurs \(v_i\) (c’est-à-dire x est combinaison linéaire des \(v_i\). Alors la décomposition de x sur les \(v_i\) est unique. </text:p>
          </table:table-cell>
        </table:table-row>
        <table:table-row table:style-name="ro1">
          <table:table-cell office:value-type="string" calcext:value-type="string">
            <text:p>Existence d'une base en dimension finie</text:p>
          </table:table-cell>
          <table:table-cell office:value-type="string" calcext:value-type="string">
            <text:p>Soit G une famille génératrice. Considérons une famille libre \(L\subset G\). Il existe alors une base B telle que \(L\subset B\subset G\). <text:s/>De toute famille génératrice on peut extraire une base. </text:p>
          </table:table-cell>
        </table:table-row>
        <table:table-row table:style-name="ro1">
          <table:table-cell office:value-type="string" calcext:value-type="string">
            <text:p>Famille et dimension</text:p>
          </table:table-cell>
          <table:table-cell office:value-type="string" calcext:value-type="string">
            <text:p>Dans un espace vectoriel de dimension n, toute famille ayant plus de n éléments est liée. <text:s/>Dans un espace vectoriel de dimension n, les familles ayant moins de n éléments ne peuvent être génératrices. </text:p>
          </table:table-cell>
        </table:table-row>
        <table:table-row table:style-name="ro1">
          <table:table-cell office:value-type="string" calcext:value-type="string">
            <text:p>Base et dimension</text:p>
          </table:table-cell>
          <table:table-cell office:value-type="string" calcext:value-type="string">
            <text:p>Toute famille génératrice ayant n éléments est une base. <text:s/>Toute famille libre ayant n éléments est une base. </text:p>
          </table:table-cell>
        </table:table-row>
        <table:table-row table:style-name="ro1">
          <table:table-cell office:value-type="string" calcext:value-type="string">
            <text:p>Diùension d'un SEV</text:p>
          </table:table-cell>
          <table:table-cell office:value-type="string" calcext:value-type="string">
            <text:p>\(\dim F \leq \dim E, \dim F = \dim E \iff F=E\) 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office:value-type="string" calcext:value-type="string">
            <text:p>On appelle somme de \(E_1,E_2\) le sous-espace de E défini par \[E_1+E_2 = \{x\in E |\exists x_1\in E_1, \exists x_2\in E_2 : x=x_1+x_2\}\] </text:p>
          </table:table-cell>
        </table:table-row>
        <table:table-row table:style-name="ro1">
          <table:table-cell office:value-type="string" calcext:value-type="string">
            <text:p>Somme directe</text:p>
          </table:table-cell>
          <table:table-cell office:value-type="string" calcext:value-type="string">
            <text:p>\(E_1, E_2\) sont en somme directe si \(E = E_1+E_2\) et \(E_1\cap E_2 = \{0\}\). On le note alors \(E_1\oplus E_2\) </text:p>
          </table:table-cell>
        </table:table-row>
        <table:table-row table:style-name="ro1">
          <table:table-cell office:value-type="string" calcext:value-type="string">
            <text:p>Espaces supplémentaires</text:p>
          </table:table-cell>
          <table:table-cell office:value-type="string" calcext:value-type="string">
            <text:p>2 espaces sont supplémentaires si \(E = E_1 \oplus E_2\) </text:p>
          </table:table-cell>
        </table:table-row>
        <table:table-row table:style-name="ro1">
          <table:table-cell office:value-type="string" calcext:value-type="string">
            <text:p>Caractérisation d'un espace supplémentaire</text:p>
          </table:table-cell>
          <table:table-cell office:value-type="string" calcext:value-type="string">
            <text:p>\(E = E_1\oplus E_2\) \(\iff\) \(E_1\cap E_2 <text:s/>= \{0\}\) et \(\dim(E) = \dim E_1+\dim E_2\) </text:p>
          </table:table-cell>
        </table:table-row>
        <table:table-row table:style-name="ro1">
          <table:table-cell office:value-type="string" calcext:value-type="string">
            <text:p>Dimensions d'espaces complémentaires</text:p>
          </table:table-cell>
          <table:table-cell office:value-type="string" calcext:value-type="string">
            <text:p>\(\dim(E_1+E_2) = \dim E_1+\dim E_2-\dim(E_1\cap E_2)\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4T17:14:51.335949653</dc:date>
    <meta:editing-duration>PT6H2M6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